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margin-bottom="0in"/>
    </style:style>
    <style:style style:name="T3" style:parent-style-name="DefaultParagraphFont" style:family="text">
      <style:text-properties style:font-name="Segoe UI Emoji" style:font-name-complex="Segoe UI Emoji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margin-bottom="0in"/>
      <style:text-properties fo:language="nl" fo:country="BE"/>
    </style:style>
    <style:style style:name="P6" style:parent-style-name="Normal" style:family="paragraph">
      <style:paragraph-properties fo:margin-bottom="0in"/>
    </style:style>
    <style:style style:name="T7" style:parent-style-name="DefaultParagraphFont" style:family="text">
      <style:text-properties fo:background-color="#00FFFF"/>
    </style:style>
    <style:style style:name="T8" style:parent-style-name="DefaultParagraphFont" style:family="text">
      <style:text-properties style:font-name="Arial" style:font-name-complex="Arial" fo:background-color="#00FFFF"/>
    </style:style>
    <style:style style:name="T9" style:parent-style-name="DefaultParagraphFont" style:family="text">
      <style:text-properties style:font-name-complex="Calibri"/>
    </style:style>
    <style:style style:name="T10" style:parent-style-name="DefaultParagraphFont" style:family="text">
      <style:text-properties style:font-name-complex="Calibri"/>
    </style:style>
    <style:style style:name="T11" style:parent-style-name="DefaultParagraphFont" style:family="text">
      <style:text-properties style:font-name-complex="Calibri"/>
    </style:style>
    <style:style style:name="T12" style:parent-style-name="DefaultParagraphFont" style:family="text">
      <style:text-properties style:font-name-complex="Calibri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T15" style:parent-style-name="DefaultParagraphFont" style:family="text">
      <style:text-properties style:font-name="Segoe UI Emoji" style:font-name-complex="Segoe UI Emoji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T19" style:parent-style-name="DefaultParagraphFont" style:family="text">
      <style:text-properties style:font-name="Segoe UI Emoji" style:font-name-complex="Segoe UI Emoji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T22" style:parent-style-name="DefaultParagraphFont" style:family="text">
      <style:text-properties fo:background-color="#00FFFF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style:font-name="Segoe UI Emoji" style:font-name-complex="Segoe UI Emoji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name="T29" style:parent-style-name="DefaultParagraphFont" style:family="text">
      <style:text-properties fo:background-color="#00FFFF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T32" style:parent-style-name="DefaultParagraphFont" style:family="text">
      <style:text-properties style:font-name="Segoe UI Emoji" style:font-name-complex="Segoe UI Emoji"/>
    </style:style>
    <style:style style:name="T33" style:parent-style-name="DefaultParagraphFont" style:family="text">
      <style:text-properties fo:language="nl" fo:country="BE"/>
    </style:style>
    <style:style style:name="P34" style:parent-style-name="Normal" style:family="paragraph">
      <style:paragraph-properties fo:margin-bottom="0in"/>
      <style:text-properties fo:language="nl" fo:country="BE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margin-bottom="0in"/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style:font-name="Segoe UI Emoji" style:font-name-complex="Segoe UI Emoji"/>
    </style:style>
    <style:style style:name="T39" style:parent-style-name="DefaultParagraphFont" style:family="text">
      <style:text-properties fo:language="nl" fo:country="BE"/>
    </style:style>
    <style:style style:name="P40" style:parent-style-name="Normal" style:family="paragraph">
      <style:paragraph-properties fo:margin-bottom="0in"/>
    </style:style>
    <style:style style:name="T41" style:parent-style-name="Hyperlink" style:family="text">
      <style:text-properties fo:background-color="#00FFFF" fo:language="nl" fo:country="BE"/>
    </style:style>
    <style:style style:name="P42" style:parent-style-name="Normal" style:family="paragraph">
      <style:paragraph-properties fo:margin-bottom="0in"/>
      <style:text-properties fo:language="nl" fo:country="BE"/>
    </style:style>
    <style:style style:name="P43" style:parent-style-name="Normal" style:family="paragraph">
      <style:paragraph-properties fo:margin-bottom="0in"/>
    </style:style>
    <style:style style:name="T44" style:parent-style-name="DefaultParagraphFont" style:family="text">
      <style:text-properties style:font-name="Segoe UI Emoji" style:font-name-complex="Segoe UI Emoji"/>
    </style:style>
    <style:style style:name="P45" style:parent-style-name="Normal" style:family="paragraph">
      <style:paragraph-properties fo:margin-bottom="0in"/>
    </style:style>
    <style:style style:name="T46" style:parent-style-name="DefaultParagraphFont" style:family="text">
      <style:text-properties fo:background-color="#00FFFF"/>
    </style:style>
    <style:style style:name="P47" style:parent-style-name="Normal" style:family="paragraph">
      <style:paragraph-properties fo:margin-bottom="0in"/>
    </style:style>
    <style:style style:name="P48" style:parent-style-name="Normal" style:family="paragraph">
      <style:paragraph-properties fo:margin-bottom="0in"/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paragraph-properties fo:margin-bottom="0in"/>
      <style:text-properties fo:language="nl" fo:country="BE"/>
    </style:style>
    <style:style style:name="P52" style:parent-style-name="Normal" style:family="paragraph">
      <style:paragraph-properties fo:margin-bottom="0in"/>
    </style:style>
    <style:style style:name="T53" style:parent-style-name="DefaultParagraphFont" style:family="text">
      <style:text-properties fo:language="nl" fo:country="BE"/>
    </style:style>
    <style:style style:name="T54" style:parent-style-name="DefaultParagraphFont" style:family="text">
      <style:text-properties fo:font-weight="bold" style:font-weight-asian="bold" style:font-weight-complex="bold" fo:language="nl" fo:country="BE"/>
    </style:style>
    <style:style style:name="T55" style:parent-style-name="DefaultParagraphFont" style:family="text">
      <style:text-properties fo:language="nl" fo:country="BE"/>
    </style:style>
    <style:style style:name="P56" style:parent-style-name="Normal" style:family="paragraph">
      <style:paragraph-properties fo:margin-bottom="0in"/>
    </style:style>
    <style:style style:name="T57" style:parent-style-name="DefaultParagraphFont" style:family="text">
      <style:text-properties style:font-name="Segoe UI Emoji" style:font-name-complex="Segoe UI Emoji"/>
    </style:style>
    <style:style style:name="T58" style:parent-style-name="DefaultParagraphFont" style:family="text">
      <style:text-properties fo:language="nl" fo:country="BE"/>
    </style:style>
    <style:style style:name="P59" style:parent-style-name="Normal" style:family="paragraph">
      <style:paragraph-properties fo:margin-bottom="0in"/>
    </style:style>
    <style:style style:name="P60" style:parent-style-name="Normal" style:family="paragraph">
      <style:paragraph-properties fo:margin-bottom="0in"/>
    </style:style>
    <style:style style:name="P6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62" style:parent-style-name="Normal" style:family="paragraph">
      <style:paragraph-properties fo:margin-bottom="0in"/>
    </style:style>
    <style:style style:name="P63" style:parent-style-name="Normal" style:family="paragraph">
      <style:paragraph-properties fo:margin-bottom="0in"/>
    </style:style>
    <style:style style:name="P64" style:parent-style-name="Normal" style:family="paragraph">
      <style:paragraph-properties fo:margin-bottom="0in"/>
    </style:style>
    <style:style style:name="P65" style:parent-style-name="Normal" style:family="paragraph">
      <style:paragraph-properties fo:margin-bottom="0in"/>
    </style:style>
    <style:style style:name="T6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family="paragraph">
      <style:paragraph-properties fo:margin-bottom="0in"/>
    </style:style>
    <style:style style:name="P69" style:parent-style-name="Normal" style:family="paragraph">
      <style:paragraph-properties fo:margin-bottom="0in"/>
    </style:style>
    <style:style style:name="P70" style:parent-style-name="Normal" style:family="paragraph">
      <style:paragraph-properties fo:margin-bottom="0in"/>
    </style:style>
    <style:style style:name="T71" style:parent-style-name="DefaultParagraphFont" style:family="text">
      <style:text-properties style:font-name="Segoe UI Emoji" style:font-name-complex="Segoe UI Emoji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family="paragraph">
      <style:paragraph-properties fo:margin-bottom="0in"/>
    </style:style>
    <style:style style:name="P74" style:parent-style-name="Normal" style:family="paragraph">
      <style:paragraph-properties fo:margin-bottom="0in"/>
    </style:style>
    <style:style style:name="T7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paragraph-properties fo:margin-bottom="0in"/>
    </style:style>
    <style:style style:name="P78" style:parent-style-name="Normal" style:family="paragraph">
      <style:paragraph-properties fo:margin-bottom="0in"/>
      <style:text-properties fo:language="nl" fo:country="BE"/>
    </style:style>
    <style:style style:name="P79" style:parent-style-name="Normal" style:family="paragraph">
      <style:paragraph-properties fo:margin-bottom="0in"/>
      <style:text-properties fo:language="nl" fo:country="BE"/>
    </style:style>
    <style:style style:name="P80" style:parent-style-name="Normal" style:family="paragraph">
      <style:paragraph-properties fo:margin-bottom="0in"/>
    </style:style>
    <style:style style:name="P81" style:parent-style-name="Normal" style:family="paragraph">
      <style:paragraph-properties fo:margin-bottom="0in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Pornește aplicația (corect)</text:p>
      <text:p text:style-name="P2"><text:span text:style-name="T3">🔹</text:span><text:s/>1. Schimbă terminalul pe CMD</text:p>
      <text:p text:style-name="P4">În VS Code, jos la TERMINAL:</text:p>
      <text:p text:style-name="P5">Uită-te în dreapta sus în zona terminalului</text:p>
      <text:p text:style-name="P6"><text:span text:style-name="T7">Apasă pe<text:s/></text:span><text:span text:style-name="T8">▼</text:span><text:s/>(l<text:span text:style-name="T9">â</text:span>ng<text:span text:style-name="T10">ă</text:span><text:s/><text:span text:style-name="T11">„</text:span>powershell<text:span text:style-name="T12">”</text:span>)</text:p>
      <text:p text:style-name="P13">Alege cmd sau Command Prompt</text:p>
      <text:p text:style-name="P14"><text:span text:style-name="T15">👉</text:span><text:s/>Acum promptul trebuie să arate așa:</text:p>
      <text:p text:style-name="P16">C:\Users\HP\Desktop&gt;</text:p>
      <text:p text:style-name="P17">(fără PS)</text:p>
      <text:p text:style-name="P18"><text:span text:style-name="T19">🔹</text:span><text:s/>2. Intră în folderul proiectului</text:p>
      <text:p text:style-name="P20">În CMD, scrie EXACT și apasă Enter:</text:p>
      <text:p text:style-name="P21"><text:span text:style-name="T22">cd terenuri-app <text:s text:c="20"/>SAU <text:s text:c="19"/>cd Desktop\terenuri-app</text:span></text:p>
      <text:p text:style-name="P23">Promptul trebuie să devină:</text:p>
      <text:p text:style-name="P24">C:\Users\HP\Desktop\terenuri-app&gt;</text:p>
      <text:p text:style-name="P25"><text:span text:style-name="T26">🔹</text:span><text:s/>3. Pornește aplicația</text:p>
      <text:p text:style-name="P27">Acum scrii:</text:p>
      <text:p text:style-name="P28"><text:span text:style-name="T29">npm run dev</text:span></text:p>
      <text:p text:style-name="P30">și Enter.</text:p>
      <text:p text:style-name="P31"><text:span text:style-name="T32">🔹</text:span><text:span text:style-name="T33"><text:s/>4. Ce trebuie să vezi</text:span></text:p>
      <text:p text:style-name="P34">Dacă totul e bine, apare ceva de genul:</text:p>
      <text:p text:style-name="P35">ready - started server on 0.0.0.0:3000</text:p>
      <text:p text:style-name="P36">Local: http://localhost:3000</text:p>
      <text:p text:style-name="P37"><text:span text:style-name="T38">👉</text:span><text:span text:style-name="T39"><text:s/>Deschizi browserul și intri la:</text:span></text:p>
      <text:p text:style-name="P40"><text:a xlink:href="http://localhost:3000" office:target-frame-name="_top" xlink:show="replace"><text:span text:style-name="T41">http://localhost:3000</text:span></text:a></text:p>
      <text:p text:style-name="P42"/>
      <text:p text:style-name="P43"><text:span text:style-name="T44">🔹</text:span><text:s/>5. Deschide pgAdmin4 dinPostgreSQL</text:p>
      <text:p text:style-name="P45">Parola:<text:s/><text:span text:style-name="T46">Postgres2026</text:span><text:s/>(parola salvata automat in aplicatie)</text:p>
      <text:p text:style-name="P47"/>
      <text:p text:style-name="P48"/>
      <text:p text:style-name="P49">În terminal, scrie<text:s/><text:span text:style-name="T50">EXACT așa</text:span>:</text:p>
      <text:p text:style-name="P51">cd Desktop\terenuri-app</text:p>
      <text:p text:style-name="P52"><text:span text:style-name="T53">Apasă<text:s/></text:span><text:span text:style-name="T54">Enter</text:span><text:span text:style-name="T55">.</text:span></text:p>
      <text:p text:style-name="P56"><text:span text:style-name="T57">🔎</text:span><text:span text:style-name="T58"><text:s/>Trebuie să vezi jos:</text:span></text:p>
      <text:p text:style-name="P59">C:\Users\HP\Desktop\terenuri-app&gt;</text:p>
      <text:p text:style-name="P60"><draw:custom-shape svg:x="0in" svg:y="0in" svg:width="45.51042in" svg:height="0.00139in" draw:id="id0" draw:style-name="a0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61">PASUL 2 — pornește aplicația</text:p>
      <text:p text:style-name="P62">Acum rulează:</text:p>
      <text:soft-page-break/>
      <text:p text:style-name="P63">npm run dev</text:p>
      <text:p text:style-name="P64"><draw:custom-shape svg:x="0in" svg:y="0in" svg:width="45.51042in" svg:height="0.00139in" draw:id="id1" draw:style-name="a1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65"><text:span text:style-name="T66">✅</text:span><text:span text:style-name="T67"><text:s/>REZULTATUL CORECT</text:span></text:p>
      <text:p text:style-name="P68">În terminal va apărea ceva de genul:</text:p>
      <text:p text:style-name="P69">Local: http://localhost:3000</text:p>
      <text:p text:style-name="P70">Deschizi în browser<text:s/><text:span text:style-name="T71">👉</text:span><text:s/><text:span text:style-name="T72">http://localhost:3000</text:span></text:p>
      <text:p text:style-name="P73"><draw:custom-shape svg:x="0in" svg:y="0in" svg:width="45.51042in" svg:height="0.00139in" draw:id="id2" draw:style-name="a2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74"><text:span text:style-name="T75">🔁</text:span><text:span text:style-name="T76"><text:s/>DACĂ MAI DĂ EROARE</text:span></text:p>
      <text:p text:style-name="P77">Rulează o singură dată:</text:p>
      <text:p text:style-name="P78">npm install</text:p>
      <text:p text:style-name="P79">și apoi din nou:</text:p>
      <text:p text:style-name="P80">npm run dev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me uragod</meta:initial-creator>
    <dc:creator>lime uragod</dc:creator>
    <meta:creation-date>2026-01-21T16:59:00Z</meta:creation-date>
    <dc:date>2026-02-17T16:15:00Z</dc:date>
    <meta:template xlink:href="Normal.dotm" xlink:type="simple"/>
    <meta:editing-cycles>6</meta:editing-cycles>
    <meta:editing-duration>PT22980S</meta:editing-duration>
    <meta:document-statistic meta:page-count="2" meta:paragraph-count="2" meta:word-count="190" meta:character-count="1273" meta:row-count="9" meta:non-whitespace-character-count="1085"/>
  </office:meta>
</office:document-meta>
</file>